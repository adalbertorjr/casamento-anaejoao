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  <style:font-face style:name="Times" svg:font-family="Times"/>
  </office:font-face-decls>
  <office:automatic-styles>
    <style:style style:name="P1" style:family="paragraph" style:parent-style-name="Standard">
      <style:paragraph-properties fo:margin-bottom="0.2222in"/>
      <style:text-properties style:font-name="Times" fo:font-size="12.0pt" fo:color="#193e18" fo:background-color="#ffffff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style:font-name="Helvetica Neue" fo:letter-spacing="0.0000in"/>
    </style:style>
    <style:style style:name="T4" style:family="text">
      <style:text-properties style:font-name="Helvetica Neue" fo:letter-spacing="0.0000in" fo:color="#000000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Esperamos vocês às &lt;b&gt;</text:span><text:span text:style-name="T2">10h30 para a cerimônia no deck&lt;/b&gt;</text:span><text:span text:style-name="T1">. Depois, seguimos para o Espaço de Eventos para servir o almoço e aproveitar com muitas conversas, risadas, jogos, dança, comidas e bebidas, até o início da noite.</text:span></text:p>
      <text:p text:style-name="P1"><text:span text:style-name="T1">Para que vocês estejam confortáveis e prontos para celebrar com a gente, sugerimos &lt;b&gt;</text:span><text:span text:style-name="T2">trajes leves e fluidos&lt;/b&gt;</text:span><text:span text:style-name="T3">. Evitem saltos finos ou sapatos escorregadios por conta da grama, e não se esqueçam dos óculos escuros.</text:span><text:span text:style-name="T4"><text:s/></text:span></text:p>
      <text:p text:style-name="P1"><text:span text:style-name="T1">Também pedimos que evitem peças muito informais, além, é claro, de não usar branco ou tons próximos — esse está reservado para a noiva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6</meta:generator>
  </office:meta>
</office:document-meta>
</file>